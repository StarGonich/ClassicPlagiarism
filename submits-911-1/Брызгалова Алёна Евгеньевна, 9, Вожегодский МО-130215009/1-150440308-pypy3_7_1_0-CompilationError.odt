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2d1d" officeooo:paragraph-rsid="00002d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вод</text:p>
      <text:p text:style-name="P1">03</text:p>
      <text:p text:style-name="P1">30</text:p>
      <text:p text:style-name="P1">04</text:p>
      <text:p text:style-name="P1">40</text:p>
      <text:p text:style-name="P1">05</text:p>
      <text:p text:style-name="P1">50</text:p>
      <text:p text:style-name="P1">12</text:p>
      <text:p text:style-name="P1">34</text:p>
      <text:p text:style-name="P1">13</text:p>
      <text:p text:style-name="P1">31</text:p>
      <text:p text:style-name="P1">14</text:p>
      <text:p text:style-name="P1">41</text:p>
      <text:p text:style-name="P1">15</text:p>
      <text:p text:style-name="P1">51</text:p>
      <text:p text:style-name="P1">23</text:p>
      <text:p text:style-name="P1">23;32;45</text:p>
      <text:p text:style-name="P1">Вывод</text:p>
      <text:p text:style-name="P1">1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1-25T09:42:54.665000000</meta:creation-date>
    <dc:date>2025-11-25T09:44:14.396000000</dc:date>
    <meta:editing-duration>PT1M21S</meta:editing-duration>
    <meta:editing-cycles>1</meta:editing-cycles>
    <meta:document-statistic meta:table-count="0" meta:image-count="0" meta:object-count="0" meta:page-count="1" meta:paragraph-count="19" meta:word-count="19" meta:character-count="49" meta:non-whitespace-character-count="49"/>
    <meta:generator>LibreOffice/6.4.7.2$Windows_X86_64 LibreOffice_project/639b8ac485750d5696d7590a72ef1b496725cfb5</meta:generator>
  </office:meta>
</office:document-meta>
</file>